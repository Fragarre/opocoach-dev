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6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7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8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9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10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11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12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13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14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15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16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17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18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19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20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21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22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23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24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25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26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27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28" style:family="paragraph" style:parent-style-name="Text_20_body" style:list-style-name="L2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29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0" style:family="paragraph" style:parent-style-name="Text_20_body" style:list-style-name="L2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1" style:family="paragraph" style:parent-style-name="Text_20_body" style:list-style-name="L3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2" style:family="paragraph" style:parent-style-name="Text_20_body" style:list-style-name="L3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3" style:family="paragraph" style:parent-style-name="Text_20_body" style:list-style-name="L3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4" style:family="paragraph" style:parent-style-name="Text_20_body" style:list-style-name="L3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5" style:family="paragraph" style:parent-style-name="Text_20_body" style:list-style-name="L3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6" style:family="paragraph" style:parent-style-name="Text_20_body" style:list-style-name="L3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7" style:family="paragraph" style:parent-style-name="Text_20_body" style:list-style-name="L3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8" style:family="paragraph" style:parent-style-name="Text_20_body" style:list-style-name="L3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39" style:family="paragraph" style:parent-style-name="Text_20_body" style:list-style-name="L3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40" style:family="paragraph" style:parent-style-name="Text_20_body" style:list-style-name="L3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P41" style:family="paragraph" style:parent-style-name="Text_20_body" style:list-style-name="L4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ato" fo:font-size="13.5pt" fo:letter-spacing="normal" fo:font-style="normal" fo:font-weight="normal"/>
    </style:style>
    <style:style style:name="T1" style:family="text">
      <style:text-properties fo:font-variant="normal" fo:text-transform="none" fo:color="#222222" loext:opacity="100%" style:font-name="Lato" fo:font-size="13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222222" loext:opacity="100%" style:font-name="Lato" fo:font-size="13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. ¿Cuál de las siguientes memorias del ordenador es de solo lectura? (2015)</text:span></text:span></text:p>
      <text:list text:style-name="L1">
        <text:list-item>
          <text:p text:style-name="P2">a) Memoria CMOS.</text:p>
        </text:list-item>
        <text:list-item>
          <text:p text:style-name="P2">b) Memoria caché.</text:p>
        </text:list-item>
        <text:list-item>
          <text:p text:style-name="P2">c) Memoria RAM.</text:p>
        </text:list-item>
        <text:list-item>
          <text:p text:style-name="P2">d) Memoria ROM.</text:p>
        </text:list-item>
      </text:list>
      <text:p text:style-name="P1"><text:span text:style-name="Strong_20_Emphasis"><text:span text:style-name="T1">2. ¿Cuál de los siguientes programas NO es un sistema operativo? (2017)</text:span></text:span></text:p>
      <text:list text:style-name="L2">
        <text:list-item>
          <text:p text:style-name="P3">a) Windows.</text:p>
        </text:list-item>
        <text:list-item>
          <text:p text:style-name="P3">b) UNIX.</text:p>
        </text:list-item>
        <text:list-item>
          <text:p text:style-name="P3">c) Apache.</text:p>
        </text:list-item>
        <text:list-item>
          <text:p text:style-name="P3">d) Linux.</text:p>
        </text:list-item>
      </text:list>
      <text:p text:style-name="P1"><text:span text:style-name="Strong_20_Emphasis"><text:span text:style-name="T1">3. ¿Cuál de estas medidas indica una cantidad menor de información? (2017)</text:span></text:span></text:p>
      <text:list text:style-name="L3">
        <text:list-item>
          <text:p text:style-name="P4">a) Gigabyte.</text:p>
        </text:list-item>
        <text:list-item>
          <text:p text:style-name="P4">b) Terabyte.</text:p>
        </text:list-item>
        <text:list-item>
          <text:p text:style-name="P4">c) Petabyte.</text:p>
        </text:list-item>
        <text:list-item>
          <text:p text:style-name="P4">d) Megabyte.</text:p>
        </text:list-item>
      </text:list>
      <text:p text:style-name="P1"><text:span text:style-name="Strong_20_Emphasis"><text:span text:style-name="T1">4. ¿Cómo se llama una computadora que lleva a cabo funciones de red para otras computadoras? (2017)</text:span></text:span></text:p>
      <text:list text:style-name="L4">
        <text:list-item>
          <text:p text:style-name="P5">a) Ethernet.</text:p>
        </text:list-item>
        <text:list-item>
          <text:p text:style-name="P5">b) Concentrador.</text:p>
        </text:list-item>
        <text:list-item>
          <text:p text:style-name="P5">c) Servidor.</text:p>
        </text:list-item>
        <text:list-item>
          <text:p text:style-name="P5">d) UNIX.</text:p>
        </text:list-item>
      </text:list>
      <text:p text:style-name="P1"><text:span text:style-name="Strong_20_Emphasis"><text:span text:style-name="T1">5. ¿Cuál de los siguientes términos se refiere a una amenaza informática? (2018)</text:span></text:span></text:p>
      <text:list text:style-name="L5">
        <text:list-item>
          <text:p text:style-name="P6">a) Conmutador.</text:p>
        </text:list-item>
        <text:list-item>
          <text:p text:style-name="P6">b) OLAP.</text:p>
        </text:list-item>
        <text:list-item>
          <text:p text:style-name="P6">c) Gusano.</text:p>
        </text:list-item>
        <text:list-item>
          <text:p text:style-name="P6">d) Monitorización.</text:p>
        </text:list-item>
      </text:list>
      <text:p text:style-name="P1"><text:span text:style-name="Strong_20_Emphasis"><text:span text:style-name="T1">6. ¿Por qué cantidad de bits está formado un byte? (2018)</text:span></text:span></text:p>
      <text:list text:style-name="L6">
        <text:list-item>
          <text:p text:style-name="P7">a) 16.</text:p>
        </text:list-item>
        <text:list-item>
          <text:p text:style-name="P7">b) 8.</text:p>
        </text:list-item>
        <text:list-item>
          <text:p text:style-name="P7">c) 2.</text:p>
        </text:list-item>
        <text:list-item>
          <text:p text:style-name="P7">d) 32.</text:p>
        </text:list-item>
      </text:list>
      <text:p text:style-name="P1"><text:span text:style-name="T2">7</text:span><text:span text:style-name="Strong_20_Emphasis"><text:span text:style-name="T1">. ¿Cuál de las siguientes es un periférico de salida? (2021)</text:span></text:span></text:p>
      <text:list text:style-name="L7">
        <text:list-item>
          <text:p text:style-name="P8">a) Teclado.</text:p>
        </text:list-item>
        <text:list-item>
          <text:p text:style-name="P8"><text:soft-page-break/>b) Ratón.</text:p>
        </text:list-item>
        <text:list-item>
          <text:p text:style-name="P8">c) Micrófono.</text:p>
        </text:list-item>
        <text:list-item>
          <text:p text:style-name="P8">d) Monitor de PC.</text:p>
        </text:list-item>
      </text:list>
      <text:p text:style-name="P1"><text:span text:style-name="T2">8</text:span><text:span text:style-name="Strong_20_Emphasis"><text:span text:style-name="T1">. ¿Cuál de los siguientes términos NO corresponde a un tipo de software malicioso? (2021)</text:span></text:span></text:p>
      <text:list text:style-name="L8">
        <text:list-item>
          <text:p text:style-name="P9">a) Virus.</text:p>
        </text:list-item>
        <text:list-item>
          <text:p text:style-name="P9">b) Troyano.</text:p>
        </text:list-item>
        <text:list-item>
          <text:p text:style-name="P9">c) Interfaz de usuario.</text:p>
        </text:list-item>
        <text:list-item>
          <text:p text:style-name="P9">d) Spyware.</text:p>
        </text:list-item>
      </text:list>
      <text:p text:style-name="P1"><text:span text:style-name="T2">9</text:span><text:span text:style-name="Strong_20_Emphasis"><text:span text:style-name="T1">. ¿Cuál de las siguientes opciones NO corresponde a un sistema operativo? (2021)</text:span></text:span></text:p>
      <text:list text:style-name="L9">
        <text:list-item>
          <text:p text:style-name="P10">a) Linux.</text:p>
        </text:list-item>
        <text:list-item>
          <text:p text:style-name="P10">b) Android.</text:p>
        </text:list-item>
        <text:list-item>
          <text:p text:style-name="P10">c) MySQL.</text:p>
        </text:list-item>
        <text:list-item>
          <text:p text:style-name="P10">d) Windows.</text:p>
        </text:list-item>
      </text:list>
      <text:p text:style-name="P1"><text:span text:style-name="Strong_20_Emphasis"><text:span text:style-name="T1">10. ¿Qué dispositivo se utiliza en una red de ordenadores para impedir el acceso de usuarios no autorizados? (2021)</text:span></text:span></text:p>
      <text:list text:style-name="L10">
        <text:list-item>
          <text:p text:style-name="P11">a) Backup.</text:p>
        </text:list-item>
        <text:list-item>
          <text:p text:style-name="P11">b) Plóter.</text:p>
        </text:list-item>
        <text:list-item>
          <text:p text:style-name="P11">c) Tarjeta de memoria.</text:p>
        </text:list-item>
        <text:list-item>
          <text:p text:style-name="P11">d) Firewall.</text:p>
        </text:list-item>
      </text:list>
      <text:p text:style-name="P1"><text:span text:style-name="Strong_20_Emphasis"><text:span text:style-name="T1">11. ¿Cuál de las siguientes opciones indica una mayor cantidad de bytes? (2021)</text:span></text:span></text:p>
      <text:list text:style-name="L11">
        <text:list-item>
          <text:p text:style-name="P12">a) 1 Kilobyte (KB).</text:p>
        </text:list-item>
        <text:list-item>
          <text:p text:style-name="P12">b) 1 Terabyte (TB).</text:p>
        </text:list-item>
        <text:list-item>
          <text:p text:style-name="P12">c) 1 Exabyte (EB).</text:p>
        </text:list-item>
        <text:list-item>
          <text:p text:style-name="P12">d) 1 Petabyte (PB).</text:p>
        </text:list-item>
      </text:list>
      <text:p text:style-name="P1"><text:span text:style-name="Strong_20_Emphasis"><text:span text:style-name="T1">12. ¿Cuál es la definición aprobada para el término «malware»? (2021)</text:span></text:span></text:p>
      <text:list text:style-name="L12">
        <text:list-item>
          <text:p text:style-name="P13">a) Software con un mal funcionamiento por defectos no detectados por su desarrollador.</text:p>
        </text:list-item>
        <text:list-item>
          <text:p text:style-name="P13">b) Programa que realiza acciones dañinas en un sistema informático de forma intencionada.</text:p>
        </text:list-item>
        <text:list-item>
          <text:p text:style-name="P13">c) Software de protección contra virus informáticos.</text:p>
        </text:list-item>
        <text:list-item>
          <text:p text:style-name="P13">d) Programa de diseño asistido por ordenador.</text:p>
        </text:list-item>
      </text:list>
      <text:p text:style-name="P1"><text:soft-page-break/><text:span text:style-name="Strong_20_Emphasis"><text:span text:style-name="T1">13. ¿Cuál de los siguientes lenguajes de programación pueden interpretar los navegadores web de forma nativa para mejorar las funcionalidades y dinamismo de las páginas web? (2021)</text:span></text:span></text:p>
      <text:list text:style-name="L13">
        <text:list-item>
          <text:p text:style-name="P14">a) C++.</text:p>
        </text:list-item>
        <text:list-item>
          <text:p text:style-name="P14">b) Visual Basic.</text:p>
        </text:list-item>
        <text:list-item>
          <text:p text:style-name="P14">c) Fortran.</text:p>
        </text:list-item>
        <text:list-item>
          <text:p text:style-name="P14">d) JavaScript.</text:p>
        </text:list-item>
      </text:list>
      <text:p text:style-name="P1"><text:span text:style-name="Strong_20_Emphasis"><text:span text:style-name="T1">14. ¿Cuál de los siguientes fue el primer fabricante de microprocesadores? (2022)</text:span></text:span></text:p>
      <text:list text:style-name="L14">
        <text:list-item>
          <text:p text:style-name="P15">a) Intel.</text:p>
        </text:list-item>
        <text:list-item>
          <text:p text:style-name="P15">b) ADM.</text:p>
        </text:list-item>
        <text:list-item>
          <text:p text:style-name="P15">c) IBM.</text:p>
        </text:list-item>
        <text:list-item>
          <text:p text:style-name="P15">d) Speadtrum.</text:p>
        </text:list-item>
      </text:list>
      <text:p text:style-name="P1"><text:span text:style-name="Strong_20_Emphasis"><text:span text:style-name="T1">15. De las opciones propuestas, indique cuál es la última versión del Sistema Operativo para móviles Android: (2022)</text:span></text:span></text:p>
      <text:list text:style-name="L15">
        <text:list-item>
          <text:p text:style-name="P16">a) Android 10.</text:p>
        </text:list-item>
        <text:list-item>
          <text:p text:style-name="P16">b) Android 17.</text:p>
        </text:list-item>
        <text:list-item>
          <text:p text:style-name="P16">c) Android 16.</text:p>
        </text:list-item>
        <text:list-item>
          <text:p text:style-name="P16">d) Android 14.</text:p>
        </text:list-item>
      </text:list>
      <text:p text:style-name="P1"><text:span text:style-name="Strong_20_Emphasis"><text:span text:style-name="T1">16. ¿Cómo se llama la causa potencial de un incidente que puede causar daños a un sistema de información o a una organización? (2022)</text:span></text:span></text:p>
      <text:list text:style-name="L16">
        <text:list-item>
          <text:p text:style-name="P17">a) Riesgo.</text:p>
        </text:list-item>
        <text:list-item>
          <text:p text:style-name="P17">b) Vulnerabilidad.</text:p>
        </text:list-item>
        <text:list-item>
          <text:p text:style-name="P17">c) Amenaza.</text:p>
        </text:list-item>
        <text:list-item>
          <text:p text:style-name="P17">d) Impacto.</text:p>
        </text:list-item>
      </text:list>
      <text:p text:style-name="P1"><text:span text:style-name="Strong_20_Emphasis"><text:span text:style-name="T1">17. ¿Cuál de los siguientes lenguajes de programación pueden interpretar los navegadores web de forma las funcionalidades y dinamismo de las páginas web? (2022)</text:span></text:span></text:p>
      <text:list text:style-name="L17">
        <text:list-item>
          <text:p text:style-name="P18">a) Basic.</text:p>
        </text:list-item>
        <text:list-item>
          <text:p text:style-name="P18">b) C#.</text:p>
        </text:list-item>
        <text:list-item>
          <text:p text:style-name="P18">c) Pascal.</text:p>
        </text:list-item>
        <text:list-item>
          <text:p text:style-name="P18">d) JavaScript.</text:p>
        </text:list-item>
      </text:list>
      <text:p text:style-name="P1"><text:span text:style-name="Strong_20_Emphasis"><text:span text:style-name="T1">18. ¿Cuál de los siguientes es un periférico de entrada? (2022)</text:span></text:span></text:p>
      <text:list text:style-name="L18">
        <text:list-item>
          <text:p text:style-name="P19">a) Impresora.</text:p>
        </text:list-item>
        <text:list-item>
          <text:p text:style-name="P19">b) Altavoces.</text:p>
        </text:list-item>
        <text:list-item>
          <text:p text:style-name="P19">c) Cámara web.</text:p>
        </text:list-item>
        <text:list-item>
          <text:p text:style-name="P19"><text:soft-page-break/>d) Pantalla.</text:p>
        </text:list-item>
      </text:list>
      <text:p text:style-name="P1"><text:span text:style-name="Strong_20_Emphasis"><text:span text:style-name="T1">19. ¿Para qué sirven las preguntas tipo CAPTCHA? (2022)</text:span></text:span></text:p>
      <text:list text:style-name="L19">
        <text:list-item>
          <text:p text:style-name="P20">a) Para evitar el phishing.</text:p>
        </text:list-item>
        <text:list-item>
          <text:p text:style-name="P20">b) Para distinguir cuándo el usuario es un humano o un programa automático.</text:p>
        </text:list-item>
        <text:list-item>
          <text:p text:style-name="P20">c) Para verificar la identidad del usuario si no se tiene un certificado electrónico válido.</text:p>
        </text:list-item>
        <text:list-item>
          <text:p text:style-name="P20">d) Para certificar que el contenido de un mensaje o página web se corresponden con el original.</text:p>
        </text:list-item>
      </text:list>
      <text:p text:style-name="P1"><text:span text:style-name="Strong_20_Emphasis"><text:span text:style-name="T1">20. ¿A cuál de los siguientes tipos de memoria se puede acceder más rápido en un PC? (2022)</text:span></text:span></text:p>
      <text:list text:style-name="L20">
        <text:list-item>
          <text:p text:style-name="P21">a) RAM.</text:p>
        </text:list-item>
        <text:list-item>
          <text:p text:style-name="P21">b) ROM.</text:p>
        </text:list-item>
        <text:list-item>
          <text:p text:style-name="P21">c) Caché.</text:p>
        </text:list-item>
        <text:list-item>
          <text:p text:style-name="P21">d) Flash.</text:p>
        </text:list-item>
      </text:list>
      <text:p text:style-name="P1"><text:span text:style-name="Strong_20_Emphasis"><text:span text:style-name="T1">21. ¿Cómo se llama al conjunto de técnicas que persiguen el engaño a una víctima ganándose su confianza haciéndose pasar una persona, empresa o servicio de confianza (suplantación de identidad de tercero de confianza), para manipularla y que realice acciones que no debería, como revelar información confidencial o hacer clic en un enlace? (2022)</text:span></text:span></text:p>
      <text:list text:style-name="L21">
        <text:list-item>
          <text:p text:style-name="P22">a) Phising.</text:p>
        </text:list-item>
        <text:list-item>
          <text:p text:style-name="P22">b) Adware.</text:p>
        </text:list-item>
        <text:list-item>
          <text:p text:style-name="P22">c) Troyano.</text:p>
        </text:list-item>
        <text:list-item>
          <text:p text:style-name="P22">d) Rootkit.</text:p>
        </text:list-item>
      </text:list>
      <text:p text:style-name="P1"><text:span text:style-name="Strong_20_Emphasis"><text:span text:style-name="T1">22. ¿Cómo se llama el servicio que se ocupa de hospedar, servir, y mantener archivos para sitios web, ofrecido por empresas denominadas ISPs (Internet Service Provider)? (2022)</text:span></text:span></text:p>
      <text:list text:style-name="L22">
        <text:list-item>
          <text:p text:style-name="P23">a) Comercio electrónico.</text:p>
        </text:list-item>
        <text:list-item>
          <text:p text:style-name="P23">b) ERP (Enterprise Resource Planning).</text:p>
        </text:list-item>
        <text:list-item>
          <text:p text:style-name="P23">c) CRM (Customer relationship management).</text:p>
        </text:list-item>
        <text:list-item>
          <text:p text:style-name="P23">d) Hosting o alojamiento web.</text:p>
        </text:list-item>
      </text:list>
      <text:p text:style-name="P1"><text:span text:style-name="Strong_20_Emphasis"><text:span text:style-name="T1">23. ¿Qué significa «plug and play»? (2022)</text:span></text:span></text:p>
      <text:list text:style-name="L23">
        <text:list-item>
          <text:p text:style-name="P24">a) Que sólo es necesario conectar el dispositivo para que funcione</text:p>
        </text:list-item>
        <text:list-item>
          <text:p text:style-name="P24">b) Que es un dispositivo de juego</text:p>
        </text:list-item>
        <text:list-item>
          <text:p text:style-name="P24">c) Que el dispositivo usa Bluetooth</text:p>
        </text:list-item>
        <text:list-item>
          <text:p text:style-name="P24">d) Que necesita ser enchufado a un puerto físico del PC</text:p>
        </text:list-item>
      </text:list>
      <text:p text:style-name="P1"><text:soft-page-break/><text:span text:style-name="Strong_20_Emphasis"><text:span text:style-name="T1">24. Señale la afirmación correcta sobre un bit: (2022)</text:span></text:span></text:p>
      <text:list text:style-name="L24">
        <text:list-item>
          <text:p text:style-name="P25">a) Es el equivalente a 8 bytes</text:p>
        </text:list-item>
        <text:list-item>
          <text:p text:style-name="P25">b) Es el equivalente a 1024Kb</text:p>
        </text:list-item>
        <text:list-item>
          <text:p text:style-name="P25">c) Es el equivalente a 1024Mb</text:p>
        </text:list-item>
        <text:list-item>
          <text:p text:style-name="P25">d) Es un cero o un uno en binario</text:p>
        </text:list-item>
      </text:list>
      <text:p text:style-name="P1"><text:span text:style-name="Strong_20_Emphasis"><text:span text:style-name="T1">25. Indique cuál de las siguientes opciones describe el término informático “Python”: (2024)</text:span></text:span></text:p>
      <text:list text:style-name="L25">
        <text:list-item>
          <text:p text:style-name="P26">a) Sistema operativo.</text:p>
        </text:list-item>
        <text:list-item>
          <text:p text:style-name="P26">b) Aplicación de hoja de cálculo.</text:p>
        </text:list-item>
        <text:list-item>
          <text:p text:style-name="P26">c) Lenguaje de programación.</text:p>
        </text:list-item>
        <text:list-item>
          <text:p text:style-name="P26">d) Protocolo de comunicaciones.</text:p>
        </text:list-item>
      </text:list>
      <text:p text:style-name="P1"><text:span text:style-name="Strong_20_Emphasis"><text:span text:style-name="T1">26. Indique cuál de los siguientes dispositivos propuestos se utiliza para la impresión: (2024)</text:span></text:span></text:p>
      <text:list text:style-name="L26">
        <text:list-item>
          <text:p text:style-name="P27">a) Plóter.</text:p>
        </text:list-item>
        <text:list-item>
          <text:p text:style-name="P27">b) UPS.</text:p>
        </text:list-item>
        <text:list-item>
          <text:p text:style-name="P27">c) Conmutador de red.</text:p>
        </text:list-item>
        <text:list-item>
          <text:p text:style-name="P27">d) Lápiz óptico.</text:p>
        </text:list-item>
      </text:list>
      <text:p text:style-name="P1"><text:span text:style-name="Strong_20_Emphasis"><text:span text:style-name="T1">27. De los siguientes elementos propuestos, ¿cuál recoge el calor generado por el procesador y lo transmite al ambiente? (2024)</text:span></text:span></text:p>
      <text:list text:style-name="L27">
        <text:list-item>
          <text:p text:style-name="P28">a) Tarjeta de red.</text:p>
        </text:list-item>
        <text:list-item>
          <text:p text:style-name="P28">b) Procesador (CPU).</text:p>
        </text:list-item>
        <text:list-item>
          <text:p text:style-name="P28">c) Placa base.</text:p>
        </text:list-item>
        <text:list-item>
          <text:p text:style-name="P28">d) Disipador.</text:p>
        </text:list-item>
      </text:list>
      <text:p text:style-name="P1"><text:span text:style-name="Strong_20_Emphasis"><text:span text:style-name="T1">28. ¿Cuál es un documento digital que contiene sus datos identificativos de su suscriptor y que vincula a su suscriptor con unos datos de verificación de firma y confirma su identidad? (2024)</text:span></text:span></text:p>
      <text:list text:style-name="L28">
        <text:list-item>
          <text:p text:style-name="P29">a) Certificación HACCP.</text:p>
        </text:list-item>
        <text:list-item>
          <text:p text:style-name="P29">b) ISO 9001.</text:p>
        </text:list-item>
        <text:list-item>
          <text:p text:style-name="P29">c) Número de serie CMD.</text:p>
        </text:list-item>
        <text:list-item>
          <text:p text:style-name="P29">d) Certificado electrónico FNMT de Ciudadano.</text:p>
        </text:list-item>
      </text:list>
      <text:p text:style-name="P1"><text:span text:style-name="Strong_20_Emphasis"><text:span text:style-name="T1">29. ¿Cuál de las siguientes afirmaciones es verdadera? (2024)</text:span></text:span></text:p>
      <text:list text:style-name="L29">
        <text:list-item>
          <text:p text:style-name="P30">El ratón es un componente interno del ordenador.</text:p>
        </text:list-item>
        <text:list-item>
          <text:p text:style-name="P30">El lápiz óptico es un periférico de entrada del ordenador.</text:p>
        </text:list-item>
        <text:list-item>
          <text:p text:style-name="P30">La función principal de la CPU es almacenar datos.</text:p>
        </text:list-item>
        <text:list-item>
          <text:p text:style-name="P30">Los dispositivos de salida permiten introducir datos en el ordenador.</text:p>
        </text:list-item>
      </text:list>
      <text:p text:style-name="P1"><text:soft-page-break/><text:span text:style-name="Strong_20_Emphasis"><text:span text:style-name="T1">30. ¿Cuál de los siguientes programas de software corresponde a una aplicación ofimática? (2024)</text:span></text:span></text:p>
      <text:list text:style-name="L30">
        <text:list-item>
          <text:p text:style-name="P31">Windows.</text:p>
        </text:list-item>
        <text:list-item>
          <text:p text:style-name="P31">Excel.</text:p>
        </text:list-item>
        <text:list-item>
          <text:p text:style-name="P31">MySQL.</text:p>
        </text:list-item>
        <text:list-item>
          <text:p text:style-name="P31">Chrome.</text:p>
        </text:list-item>
      </text:list>
      <text:p text:style-name="P1"><text:span text:style-name="Strong_20_Emphasis"><text:span text:style-name="T1">31. ¿Cuál de las siguientes opciones corresponde a un sistema operativo? (2024)</text:span></text:span></text:p>
      <text:list text:style-name="L31">
        <text:list-item>
          <text:p text:style-name="P32">AMD.</text:p>
        </text:list-item>
        <text:list-item>
          <text:p text:style-name="P32">PostgreSQL.</text:p>
        </text:list-item>
        <text:list-item>
          <text:p text:style-name="P32">Mac OS.</text:p>
        </text:list-item>
        <text:list-item>
          <text:p text:style-name="P32">RJ45.</text:p>
        </text:list-item>
      </text:list>
      <text:p text:style-name="P1"><text:span text:style-name="Strong_20_Emphasis"><text:span text:style-name="T1">32. ¿Cuál de las siguientes afirmaciones es verdadera? (2024)</text:span></text:span></text:p>
      <text:list text:style-name="L32">
        <text:list-item>
          <text:p text:style-name="P33">El escáner es un periférico de entrada del ordenador.</text:p>
        </text:list-item>
        <text:list-item>
          <text:p text:style-name="P33">Los ordenadores con sistema operativo Linux no admiten impresoras.</text:p>
        </text:list-item>
        <text:list-item>
          <text:p text:style-name="P33">La impresora es un periférico de entrada del ordenador.</text:p>
        </text:list-item>
        <text:list-item>
          <text:p text:style-name="P33">La función principal de una tarjeta de red es la impresión.</text:p>
        </text:list-item>
      </text:list>
      <text:p text:style-name="P1"><text:span text:style-name="Strong_20_Emphasis"><text:span text:style-name="T1">33. ¿Cuál de los siguientes tipos de datos se corresponde con el siguiente dato: 6,21?</text:span></text:span></text:p>
      <text:list text:style-name="L33">
        <text:list-item>
          <text:p text:style-name="P34">a) Entero.</text:p>
        </text:list-item>
        <text:list-item>
          <text:p text:style-name="P34">b) Booleano.</text:p>
        </text:list-item>
        <text:list-item>
          <text:p text:style-name="P34">c) Lista.</text:p>
        </text:list-item>
        <text:list-item>
          <text:p text:style-name="P34">d) Coma flotante.</text:p>
        </text:list-item>
      </text:list>
      <text:p text:style-name="P1"><text:span text:style-name="Strong_20_Emphasis"><text:span text:style-name="T1">34. ¿A cuál de las siguientes definiciones corresponden las siglas OCR?</text:span></text:span></text:p>
      <text:list text:style-name="L34">
        <text:list-item>
          <text:p text:style-name="P35">a) Biblioteca abierta de gráficos.</text:p>
        </text:list-item>
        <text:list-item>
          <text:p text:style-name="P35">b) Lenguaje de computación abierto.</text:p>
        </text:list-item>
        <text:list-item>
          <text:p text:style-name="P35">c) Terminal de red óptica.</text:p>
        </text:list-item>
        <text:list-item>
          <text:p text:style-name="P35">d) Reconocimiento óptico de caracteres.</text:p>
        </text:list-item>
      </text:list>
      <text:p text:style-name="P1"><text:span text:style-name="Strong_20_Emphasis"><text:span text:style-name="T1">35. Señala cuál de las opciones NO es un sistema de archivos:</text:span></text:span></text:p>
      <text:list text:style-name="L35">
        <text:list-item>
          <text:p text:style-name="P36">a) FAT32</text:p>
        </text:list-item>
        <text:list-item>
          <text:p text:style-name="P36">b) NTFS</text:p>
        </text:list-item>
        <text:list-item>
          <text:p text:style-name="P36">c) ext2</text:p>
        </text:list-item>
        <text:list-item>
          <text:p text:style-name="P36">d) Solaris</text:p>
        </text:list-item>
      </text:list>
      <text:p text:style-name="P1"><text:span text:style-name="Strong_20_Emphasis"><text:span text:style-name="T1">36. ¿Cuál de los siguientes tipos de datos sirve para valores lógicos del tipo Verdadero o Falso?</text:span></text:span></text:p>
      <text:list text:style-name="L36">
        <text:list-item>
          <text:p text:style-name="P37">a) Número entero</text:p>
        </text:list-item>
        <text:list-item>
          <text:p text:style-name="P37"><text:soft-page-break/>b) Número de coma flotante</text:p>
        </text:list-item>
        <text:list-item>
          <text:p text:style-name="P37">c) Carácter</text:p>
        </text:list-item>
        <text:list-item>
          <text:p text:style-name="P37">d) Booleano</text:p>
        </text:list-item>
      </text:list>
      <text:p text:style-name="P1"><text:span text:style-name="Strong_20_Emphasis"><text:span text:style-name="T1">37. ¿Cuál de los siguientes elementos de un ordenador es un periférico?</text:span></text:span></text:p>
      <text:list text:style-name="L37">
        <text:list-item>
          <text:p text:style-name="P38">a) CPU</text:p>
        </text:list-item>
        <text:list-item>
          <text:p text:style-name="P38">b) RAM</text:p>
        </text:list-item>
        <text:list-item>
          <text:p text:style-name="P38">c) Teclado</text:p>
        </text:list-item>
        <text:list-item>
          <text:p text:style-name="P38">d) Bus de datos</text:p>
        </text:list-item>
      </text:list>
      <text:p text:style-name="P1"><text:span text:style-name="Strong_20_Emphasis"><text:span text:style-name="T1">38. Señala qué es un plotter:</text:span></text:span></text:p>
      <text:list text:style-name="L38">
        <text:list-item>
          <text:p text:style-name="P39">a) Un tipo de microprocesador.</text:p>
        </text:list-item>
        <text:list-item>
          <text:p text:style-name="P39">b) Un tipo de módem.</text:p>
        </text:list-item>
        <text:list-item>
          <text:p text:style-name="P39">c) Un tipo de ratón</text:p>
        </text:list-item>
        <text:list-item>
          <text:p text:style-name="P39">d) Un tipo de impresora</text:p>
        </text:list-item>
      </text:list>
      <text:p text:style-name="P1"><text:span text:style-name="Strong_20_Emphasis"><text:span text:style-name="T1">39. Sabiendo que un bit contiene un 1 o un 0, indica cuántos unos o ceros puede contener un byte en total:</text:span></text:span></text:p>
      <text:list text:style-name="L39">
        <text:list-item>
          <text:p text:style-name="P40">a) 2</text:p>
        </text:list-item>
        <text:list-item>
          <text:p text:style-name="P40">b) 4</text:p>
        </text:list-item>
        <text:list-item>
          <text:p text:style-name="P40">c) 8</text:p>
        </text:list-item>
        <text:list-item>
          <text:p text:style-name="P40">d) 10</text:p>
        </text:list-item>
      </text:list>
      <text:p text:style-name="P1"><text:span text:style-name="Strong_20_Emphasis"><text:span text:style-name="T1">Lista de Respuestas Correctas:</text:span></text:span></text:p>
      <text:list text:style-name="L40">
        <text:list-item>
          <text:p text:style-name="P41">(2015): d</text:p>
        </text:list-item>
        <text:list-item>
          <text:p text:style-name="P41">(2017): c</text:p>
        </text:list-item>
        <text:list-item>
          <text:p text:style-name="P41">(2017): d</text:p>
        </text:list-item>
        <text:list-item>
          <text:p text:style-name="P41">(2017): c</text:p>
        </text:list-item>
        <text:list-item>
          <text:p text:style-name="P41">(2018): c</text:p>
        </text:list-item>
        <text:list-item>
          <text:p text:style-name="P41">(2018): b</text:p>
        </text:list-item>
        <text:list-item>
          <text:p text:style-name="P41">(2021): d</text:p>
        </text:list-item>
        <text:list-item>
          <text:p text:style-name="P41">(2021): c</text:p>
        </text:list-item>
        <text:list-item>
          <text:p text:style-name="P41">(2021): c</text:p>
        </text:list-item>
        <text:list-item>
          <text:p text:style-name="P41">(2021): d</text:p>
        </text:list-item>
        <text:list-item>
          <text:p text:style-name="P41">(2021): c</text:p>
        </text:list-item>
        <text:list-item>
          <text:p text:style-name="P41">(2021): b</text:p>
        </text:list-item>
        <text:list-item>
          <text:p text:style-name="P41">(2021): d</text:p>
        </text:list-item>
        <text:list-item>
          <text:p text:style-name="P41">(2022): a</text:p>
        </text:list-item>
        <text:list-item>
          <text:p text:style-name="P41">(2022): d</text:p>
        </text:list-item>
        <text:list-item>
          <text:p text:style-name="P41">(2022): c</text:p>
        </text:list-item>
        <text:list-item>
          <text:p text:style-name="P41">(2022): d</text:p>
        </text:list-item>
        <text:list-item>
          <text:p text:style-name="P41">(2022): c</text:p>
        </text:list-item>
        <text:list-item>
          <text:p text:style-name="P41"><text:soft-page-break/>(2022): b</text:p>
        </text:list-item>
        <text:list-item>
          <text:p text:style-name="P41">(2022): c</text:p>
        </text:list-item>
        <text:list-item>
          <text:p text:style-name="P41">(2022): a</text:p>
        </text:list-item>
        <text:list-item>
          <text:p text:style-name="P41">(2022): d</text:p>
        </text:list-item>
        <text:list-item>
          <text:p text:style-name="P41">(2024): a</text:p>
        </text:list-item>
        <text:list-item>
          <text:p text:style-name="P41">(2024): d</text:p>
        </text:list-item>
        <text:list-item>
          <text:p text:style-name="P41">(2024): c</text:p>
        </text:list-item>
        <text:list-item>
          <text:p text:style-name="P41">(2024): a</text:p>
        </text:list-item>
        <text:list-item>
          <text:p text:style-name="P41">(2024): d</text:p>
        </text:list-item>
        <text:list-item>
          <text:p text:style-name="P41">(2024): d</text:p>
        </text:list-item>
        <text:list-item>
          <text:p text:style-name="P41">(2024): b</text:p>
        </text:list-item>
        <text:list-item>
          <text:p text:style-name="P41">(2024): b</text:p>
        </text:list-item>
        <text:list-item>
          <text:p text:style-name="P41">(2024): c</text:p>
        </text:list-item>
        <text:list-item>
          <text:p text:style-name="P41">(2024): a</text:p>
        </text:list-item>
        <text:list-item>
          <text:p text:style-name="P41">d</text:p>
        </text:list-item>
        <text:list-item>
          <text:p text:style-name="P41">d</text:p>
        </text:list-item>
        <text:list-item>
          <text:p text:style-name="P41">d</text:p>
        </text:list-item>
        <text:list-item>
          <text:p text:style-name="P41">d</text:p>
        </text:list-item>
        <text:list-item>
          <text:p text:style-name="P41">c</text:p>
        </text:list-item>
        <text:list-item>
          <text:p text:style-name="P41">d</text:p>
        </text:list-item>
        <text:list-item>
          <text:p text:style-name="P41">c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3T20:10:34.778119100</meta:creation-date>
    <dc:date>2026-07-13T20:48:29.242153500</dc:date>
    <meta:editing-duration>PT27M41S</meta:editing-duration>
    <meta:editing-cycles>1</meta:editing-cycles>
    <meta:generator>LibreOffice/26.2.4.2$Windows_X86_64 LibreOffice_project/0229ac93fcf0d7cbc6376066c6f35021cef002dc</meta:generator>
    <meta:document-statistic meta:table-count="0" meta:image-count="0" meta:object-count="0" meta:page-count="8" meta:paragraph-count="235" meta:word-count="1463" meta:character-count="7534" meta:non-whitespace-character-count="6501"/>
  </office:meta>
</office:document-meta>
</file>